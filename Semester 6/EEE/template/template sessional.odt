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44" style:family="paragraph" style:name="P45">
      <style:paragraph-properties fo:text-align="right"/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93">
      <style:text-properties fo:color="#000000" fo:font-family="Times New Roman" style:font-family-complex="Times New Roman" fo:font-size="11pt" style:font-size-complex="11pt" fo:language="en" style:language-complex="ar" fo:country="US" style:country-complex="SA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4">
      <style:text-properties fo:color="#ed7d31" fo:font-family="Times New Roman" style:font-family-complex="Times New Roman" fo:font-size="28pt" style:font-size-complex="28pt" fo:language="en" style:language-complex="ar" fo:country="US" style:country-complex="SA" fo:font-weight="bold"/>
    </style:style>
    <style:style style:family="text" style:name="T95"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96"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4" style:family="paragraph" style:name="P46">
      <style:paragraph-properties fo:text-align="right"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97">
      <style:text-properties fo:color="#000000" fo:font-family="Times New Roman" style:font-family-complex="Times New Roman" fo:font-size="18pt" style:font-size-complex="20pt" fo:language="en" style:language-complex="ar" fo:country="US" style:country-complex="SA" fo:font-weight="normal"/>
    </style:style>
    <style:style style:family="text" style:name="T98">
      <style:text-properties fo:color="#000000" fo:font-family="Times New Roman" style:font-family-complex="Times New Roman" fo:font-size="18pt" style:font-size-complex="20pt" fo:language="en" style:language-complex="ar" fo:country="US" style:country-complex="SA" fo:font-weight="bold"/>
    </style:style>
    <style:style style:family="text" style:name="T99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00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47">
      <style:paragraph-properties fo:text-align="center"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101">
      <style:text-properties fo:color="#000000" fo:font-family="Times New Roman" style:font-family-complex="Times New Roman" fo:font-size="11pt" style:font-size-complex="11pt" fo:language="en" style:language-complex="ar" fo:country="US" style:country-complex="SA"/>
    </style:style>
    <style:style style:family="graphic" style:name="gr4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102">
      <style:text-properties fo:color="#000000" fo:font-family="Calibri" style:font-family-complex="Calibri" fo:font-size="12pt" style:font-size-complex="12pt" fo:language="en" style:language-complex="ar" fo:country="US" style:country-complex="SA"/>
    </style:style>
    <style:style style:family="text" style:name="T103"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4" style:family="paragraph" style:name="P48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04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05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06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49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07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08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09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50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10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11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12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51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13">
      <style:text-properties fo:color="#ed7d31" fo:font-family="Times New Roman" style:font-family-complex="Times New Roman" fo:font-size="22pt" style:font-size-complex="22pt" fo:language="en" style:language-complex="ar" fo:country="US" style:country-complex="SA" fo:font-weight="bold"/>
    </style:style>
    <style:style style:family="text" style:name="T114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15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52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16">
      <style:text-properties fo:color="#ed7d31" fo:font-family="Times New Roman" style:font-family-complex="Times New Roman" fo:font-size="22pt" style:font-size-complex="22pt" fo:language="en" style:language-complex="ar" fo:country="US" style:country-complex="SA" fo:font-weight="bold"/>
    </style:style>
    <style:style style:family="text" style:name="T117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18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53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119">
      <style:text-properties fo:color="#ed7d31" fo:font-family="Times New Roman" style:font-family-complex="Times New Roman" fo:font-size="22pt" style:font-size-complex="22pt" fo:language="en" style:language-complex="ar" fo:country="US" style:country-complex="SA" fo:font-weight="bold"/>
    </style:style>
    <style:style style:family="text" style:name="T120">
      <style:text-properties fo:color="#000000" fo:font-family="Calibri" style:font-family-complex="Calibri" fo:font-size="12pt" style:font-size-complex="12pt" fo:language="en" style:language-complex="ar" fo:country="US" style:country-complex="SA"/>
    </style:style>
    <style:style style:family="text" style:name="T121"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4" style:family="paragraph" style:name="P54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22">
      <style:text-properties fo:color="#073763" fo:font-family="Times New Roman" style:font-family-complex="Times New Roman" fo:font-size="20pt" style:font-size-complex="20pt" fo:language="en" style:language-complex="ar" fo:country="US" style:country-complex="SA" fo:font-weight="bold"/>
    </style:style>
    <style:style style:family="text" style:name="T123">
      <style:text-properties fo:color="#073763" fo:font-family="Times New Roman" style:font-family-complex="Times New Roman" fo:font-size="20pt" style:font-size-complex="20pt" fo:language="en" style:language-complex="ar" fo:country="US" style:country-complex="SA" fo:font-weight="bold"/>
    </style:style>
    <style:style style:family="text" style:name="T124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25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26">
      <style:text-properties fo:color="#000000" fo:font-family="Times New Roman" style:font-family-complex="Times New Roman" fo:font-size="12pt" style:font-size-complex="12pt" fo:language="en" style:language-complex="ar" fo:country="US" style:country-complex="SA" fo:font-weight="bold"/>
    </style:style>
    <style:style style:family="graphic" style:name="gr5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127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28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55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129">
      <style:text-properties fo:color="#ed7d31" fo:font-family="Times New Roman" style:font-family-complex="Times New Roman" fo:font-size="22pt" style:font-size-complex="22pt" fo:language="en" style:language-complex="ar" fo:country="US" style:country-complex="SA" fo:font-weight="bold"/>
    </style:style>
    <style:style style:family="text" style:name="T130">
      <style:text-properties fo:color="#000000" fo:font-family="Calibri" style:font-family-complex="Calibri" fo:font-size="12pt" style:font-size-complex="12pt" fo:language="en" style:language-complex="ar" fo:country="US" style:country-complex="SA"/>
    </style:style>
    <style:style style:family="text" style:name="T131"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4" style:family="paragraph" style:name="P56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family="text" style:name="T132">
      <style:text-properties fo:color="#ed7d31" fo:font-family="Times New Roman" style:font-family-complex="Times New Roman" fo:font-size="22pt" style:font-size-complex="22pt" fo:language="en" style:language-complex="ar" fo:country="US" style:country-complex="SA" fo:font-weight="bold"/>
    </style:style>
    <style:style style:family="text" style:name="T133">
      <style:text-properties fo:color="#000000" fo:font-family="Calibri" style:font-family-complex="Calibri" fo:font-size="12pt" style:font-size-complex="12pt" fo:language="en" style:language-complex="ar" fo:country="US" style:country-complex="SA" fo:font-weight="bold"/>
    </style:style>
    <style:style style:family="text" style:name="T134">
      <style:text-properties fo:color="#000000" fo:font-family="Calibri" style:font-family-complex="Calibri" fo:font-size="11pt" style:font-size-complex="11pt" fo:language="en" style:language-complex="ar" fo:country="US" style:country-complex="SA" fo:font-weight="bold"/>
    </style:style>
    <style:style style:parent-style-name="744" style:family="paragraph" style:name="P57">
      <style:paragraph-properties>
        <style:tab-stops>
          <style:tab-stop style:position="5.37cm" style:type="left"/>
        </style:tab-stops>
      </style:paragraph-properties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135">
      <style:text-properties fo:color="#073763" fo:font-family="Times New Roman" style:font-family-complex="Times New Roman" fo:font-size="20pt" style:font-size-complex="20pt" fo:language="en" style:language-complex="ar" fo:country="US" style:country-complex="SA" fo:font-weight="bold"/>
    </style:style>
    <style:style style:family="text" style:name="T136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37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38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39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40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41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normal"/>
    </style:style>
    <style:style style:family="text" style:name="T142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43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normal"/>
    </style:style>
    <style:style style:family="text" style:name="T144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45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normal"/>
    </style:style>
    <style:style style:family="text" style:name="T146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47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48">
      <style:text-properties fo:color="#000000" fo:font-family="Calibri" style:font-family-complex="Calibri" fo:font-size="12pt" style:font-size-complex="12pt" fo:language="en" style:language-complex="ar" fo:country="US" style:country-complex="SA"/>
    </style:style>
    <style:style style:family="text" style:name="T149"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4" style:family="paragraph" style:name="P58">
      <style:paragraph-properties/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150">
      <style:text-properties fo:color="#000000" fo:font-family="Times New Roman" style:font-family-complex="Times New Roman" fo:font-size="11pt" style:font-size-complex="11pt" fo:language="en" style:language-complex="ar" fo:country="US" style:country-complex="SA"/>
    </style:style>
    <style:style style:family="graphic" style:name="gr6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151">
      <style:text-properties fo:color="#000000" fo:font-family="Calibri" style:font-family-complex="Calibri" fo:font-size="12pt" style:font-size-complex="12pt" fo:language="en" style:language-complex="ar" fo:country="US" style:country-complex="SA"/>
    </style:style>
    <style:style style:family="text" style:name="T152"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4" style:family="paragraph" style:name="P59">
      <style:paragraph-properties/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family="text" style:name="T153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54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55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56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57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58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59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60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61">
      <style:text-properties fo:color="#000000" fo:font-family="Times New Roman" style:font-family-complex="Times New Roman" fo:font-size="18pt" style:font-size-complex="18pt" fo:language="en" style:language-complex="ar" fo:country="US" style:country-complex="SA"/>
    </style:style>
    <style:style style:family="text" style:name="T162">
      <style:text-properties fo:color="#000000" fo:font-family="Times New Roman" style:font-family-complex="Times New Roman" fo:font-size="18pt" style:font-size-complex="18pt" fo:language="en" style:language-complex="ar" fo:country="US" style:country-complex="SA" fo:font-weight="bold"/>
    </style:style>
    <style:style style:family="text" style:name="T163">
      <style:text-properties fo:color="#000000" fo:font-family="Times New Roman" style:font-family-complex="Times New Roman" fo:font-size="11pt" style:font-size-complex="11pt" fo:language="en" style:language-complex="ar" fo:country="US" style:country-complex="SA"/>
    </style:style>
    <style:style style:family="text" style:name="T164">
      <style:text-properties fo:color="#000000" fo:font-family="Times New Roman" style:font-family-complex="Times New Roman" fo:font-size="11pt" style:font-size-complex="11pt" fo:language="en" style:language-complex="ar" fo:country="US" style:country-complex="SA"/>
    </style:style>
    <style:style style:family="text" style:name="T165">
      <style:text-properties fo:color="#000000" fo:font-family="Times New Roman" style:font-family-complex="Times New Roman" fo:font-size="11pt" style:font-size-complex="11pt" fo:language="en" style:language-complex="ar" fo:country="US" style:country-complex="SA"/>
    </style:style>
    <style:style style:family="text" style:name="T166">
      <style:text-properties fo:color="#000000" fo:font-family="Calibri" style:font-family-complex="Calibri" fo:font-size="12pt" style:font-size-complex="12pt" fo:language="en" style:language-complex="ar" fo:country="US" style:country-complex="SA"/>
    </style:style>
    <style:style style:family="text" style:name="T167">
      <style:text-properties fo:color="#000000" fo:font-family="Calibri" style:font-family-complex="Calibri" fo:font-size="11pt" style:font-size-complex="11pt" fo:language="en" style:language-complex="ar" fo:country="US" style:country-complex="SA"/>
    </style:style>
  </office:automatic-styles>
  <office:body>
    <office:text text:use-soft-page-breaks="true">
      <text:p text:style-name="P45"><text:span text:style-name="T93"/><text:span/><draw:frame draw:name="image1.jpg" draw:style-name="gr3" draw:z-index="12" text:anchor-type="paragraph" svg:width="4.239cm" svg:height="4.239cm" svg:x="0.08103cm" svg:y="0.03505cm"><draw:image xlink:href="Pictures/image1.jpg" xlink:type="simple" xlink:show="embed" xlink:actuate="onLoad"/></draw:frame><text:span text:style-name="T94">Patuakhali Science and Technology University</text:span><text:span text:style-name="T95"/><text:span text:style-name="T96"/></text:p>
      <text:p text:style-name="P46"><text:span text:style-name="T97"/><text:span text:style-name="T98">Dumki, Patuakhali</text:span><text:span text:style-name="T99"/><text:span text:style-name="T100"/></text:p>
      <text:p text:style-name="P47"><text:span text:style-name="T101"/><text:span/><draw:rect draw:name="Shape1" draw:style-name="gr4" text:anchor-type="as-char" svg:width="15.92cm" svg:height="0.0541cm" svg:x="0cm" svg:y="0cm"/><text:span text:style-name="T102"/><text:span text:style-name="T103"/></text:p>
      <text:p text:style-name="P48"><text:span text:style-name="T104"/><text:span text:style-name="T105"/><text:span text:style-name="T106"/></text:p>
      <text:p text:style-name="P49"><text:span text:style-name="T107"/><text:span text:style-name="T108"/><text:span text:style-name="T109"/></text:p>
      <text:p text:style-name="P50"><text:span text:style-name="T110"/><text:span text:style-name="T111"/><text:span text:style-name="T112"/></text:p>
      <text:p text:style-name="P51"><text:span text:style-name="T113"/><text:span text:style-name="T114"/><text:span text:style-name="T115"/></text:p>
      <text:p text:style-name="P52"><text:span text:style-name="T116"/><text:span text:style-name="T117"/><text:span text:style-name="T118"/></text:p>
      <text:p text:style-name="P53"><text:span text:style-name="T119">SUBMITTED TO:</text:span><text:span text:style-name="T120"/><text:span text:style-name="T121"/></text:p>
      <text:p text:style-name="P54"><text:span text:style-name="T122"/><text:span text:style-name="T123">Dr. S.M. Taohidul Islam</text:span><text:span text:style-name="T124">Professor,</text:span><text:span text:style-name="T125">Department of Electrical and Electronics Engineering</text:span><text:span text:style-name="T126">.</text:span><text:span/><draw:rect draw:name="Shape2" draw:style-name="gr5" text:anchor-type="as-char" svg:width="15.92cm" svg:height="0.0541cm" svg:x="0cm" svg:y="0cm"/><text:span text:style-name="T127"/><text:span text:style-name="T128"/></text:p>
      <text:p text:style-name="P55"><text:span text:style-name="T129"/><text:span text:style-name="T130"/><text:span text:style-name="T131"/></text:p>
      <text:p text:style-name="P56"><text:span text:style-name="T132">SUBMITTED BY:</text:span><text:span text:style-name="T133"/><text:span text:style-name="T134"/></text:p>
      <text:p text:style-name="P57"><text:span text:style-name="T135">Md. Sharafat Karim </text:span><text:span text:style-name="T136">ID: </text:span><text:span text:style-name="T137">2102024</text:span><text:span text:style-name="T138">, </text:span><text:span text:style-name="T139">Registration No: </text:span><text:span text:style-name="T140">10151</text:span><text:span text:style-name="T141">,</text:span><text:span text:style-name="T142"><text:line-break/></text:span><text:span text:style-name="T143">Semister: </text:span><text:span text:style-name="T144">6th (L-3, S-2)</text:span><text:span text:style-name="T145">,</text:span><text:span text:style-name="T146"><text:line-break/></text:span><text:span text:style-name="T147">Faculty of Computer Science and Engineering.</text:span><text:span text:style-name="T148"/><text:span text:style-name="T149"/></text:p>
      <text:p text:style-name="P58"><text:span text:style-name="T150"/><text:span/><draw:rect draw:name="Shape3" draw:style-name="gr6" text:anchor-type="as-char" svg:width="15.92cm" svg:height="0.0541cm" svg:x="0cm" svg:y="0cm"/><text:span text:style-name="T151"/><text:span text:style-name="T152"/></text:p>
      <text:p text:style-name="P59"><text:span text:style-name="T153">Course Code: </text:span><text:span text:style-name="T154">EEE-222</text:span><text:span text:style-name="T155">Course TItle:</text:span><text:span text:style-name="T156"><text:s/></text:span><text:span text:style-name="T157">Digital Electronics and Pulse Techniques <text:tab/><text:tab/><text:tab/><text:tab/><text:s text:c="7"/>Sessional</text:span><text:span text:style-name="T158"><text:line-break/>Assignment title: </text:span><text:span text:style-name="T159">Simulation r</text:span><text:span text:style-name="T160">eport book</text:span><text:span text:style-name="T161">Date of submission:</text:span><text:span text:style-name="T162"> 10 June, 2026</text:span><text:span text:style-name="T163"><text:line-break/></text:span><text:span text:style-name="T164"/><text:bookmark-start text:name="_GoBack"/><text:span text:style-name="T165"/><text:bookmark-end text:name="_GoBack"/><text:span text:style-name="T166"/><text:span text:style-name="T1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7">
      <style:paragraph-properties/>
      <style:text-properties fo:font-size="10pt"/>
    </style:style>
    <style:style style:display-name="DStyle_text" style:family="text" style:name="688">
      <style:paragraph-properties/>
    </style:style>
    <style:style style:parent-style-name="687" style:display-name="DStyle_paragraph" style:family="paragraph" style:name="689">
      <style:paragraph-properties/>
      <style:text-properties fo:font-size="10pt"/>
    </style:style>
    <style:style style:parent-style-name="687" style:display-name="DStyle_text" style:family="text" style:name="690">
      <style:paragraph-properties/>
    </style:style>
    <style:style style:class="default" style:display-name="Normal" style:family="paragraph" style:name="691">
      <style:paragraph-properties/>
      <style:text-properties/>
    </style:style>
    <style:style style:parent-style-name="691" style:display-name="Heading 7" style:family="paragraph" style:name="692">
      <style:paragraph-properties fo:margin-top="2pt" fo:margin-bottom="0pt"/>
      <style:text-properties fo:color="#595959" fo:font-family="Arial" style:font-family-complex="Arial"/>
    </style:style>
    <style:style style:parent-style-name="691" style:display-name="Heading 8" style:family="paragraph" style:name="693">
      <style:paragraph-properties fo:margin-bottom="0pt"/>
      <style:text-properties fo:color="#272727" fo:font-family="Arial" style:font-family-complex="Arial" fo:font-style="italic"/>
    </style:style>
    <style:style style:parent-style-name="691" style:display-name="Heading 9" style:family="paragraph" style:name="694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95">
      <style:paragraph-properties/>
    </style:style>
    <style:style style:parent-style-name="695" style:display-name="Heading 1 Char" style:family="text" style:name="696">
      <style:paragraph-properties/>
      <style:text-properties fo:color="#0f4761" fo:font-family="Arial" style:font-family-complex="Arial" fo:font-size="20pt" style:font-size-complex="20pt"/>
    </style:style>
    <style:style style:parent-style-name="695" style:display-name="Heading 2 Char" style:family="text" style:name="697">
      <style:paragraph-properties/>
      <style:text-properties fo:color="#0f4761" fo:font-family="Arial" style:font-family-complex="Arial" fo:font-size="16pt" style:font-size-complex="16pt"/>
    </style:style>
    <style:style style:parent-style-name="695" style:display-name="Heading 3 Char" style:family="text" style:name="698">
      <style:paragraph-properties/>
      <style:text-properties fo:color="#0f4761" fo:font-family="Arial" style:font-family-complex="Arial" fo:font-size="14pt" style:font-size-complex="14pt"/>
    </style:style>
    <style:style style:parent-style-name="695" style:display-name="Heading 4 Char" style:family="text" style:name="699">
      <style:paragraph-properties/>
      <style:text-properties fo:color="#0f4761" fo:font-family="Arial" style:font-family-complex="Arial" fo:font-style="italic"/>
    </style:style>
    <style:style style:parent-style-name="695" style:display-name="Heading 5 Char" style:family="text" style:name="700">
      <style:paragraph-properties/>
      <style:text-properties fo:color="#0f4761" fo:font-family="Arial" style:font-family-complex="Arial"/>
    </style:style>
    <style:style style:parent-style-name="695" style:display-name="Heading 6 Char" style:family="text" style:name="701">
      <style:paragraph-properties/>
      <style:text-properties fo:color="#595959" fo:font-family="Arial" style:font-family-complex="Arial" fo:font-style="italic"/>
    </style:style>
    <style:style style:parent-style-name="695" style:display-name="Heading 7 Char" style:family="text" style:name="702">
      <style:paragraph-properties/>
      <style:text-properties fo:color="#595959" fo:font-family="Arial" style:font-family-complex="Arial"/>
    </style:style>
    <style:style style:parent-style-name="695" style:display-name="Heading 8 Char" style:family="text" style:name="703">
      <style:paragraph-properties/>
      <style:text-properties fo:color="#272727" fo:font-family="Arial" style:font-family-complex="Arial" fo:font-style="italic"/>
    </style:style>
    <style:style style:parent-style-name="695" style:display-name="Heading 9 Char" style:family="text" style:name="704">
      <style:paragraph-properties/>
      <style:text-properties fo:color="#272727" fo:font-family="Arial" style:font-family-complex="Arial" fo:font-style="italic"/>
    </style:style>
    <style:style style:parent-style-name="695" style:display-name="Title Char" style:family="text" style:name="705">
      <style:paragraph-properties/>
      <style:text-properties fo:font-family="Arial" style:font-family-complex="Arial" fo:font-size="28pt" style:font-size-complex="28pt" fo:letter-spacing="-0.5pt"/>
    </style:style>
    <style:style style:parent-style-name="695" style:display-name="Subtitle Char" style:family="text" style:name="706">
      <style:paragraph-properties/>
      <style:text-properties fo:color="#595959" fo:font-size="14pt" style:font-size-complex="14pt" fo:letter-spacing="0.75pt"/>
    </style:style>
    <style:style style:parent-style-name="691" style:display-name="Quote" style:family="paragraph" style:name="707">
      <style:paragraph-properties fo:text-align="center" fo:margin-top="8pt"/>
      <style:text-properties fo:color="#404040" fo:font-style="italic"/>
    </style:style>
    <style:style style:parent-style-name="695" style:display-name="Quote Char" style:family="text" style:name="708">
      <style:paragraph-properties/>
      <style:text-properties fo:color="#404040" fo:font-style="italic"/>
    </style:style>
    <style:style style:parent-style-name="695" style:display-name="Intense Emphasis" style:family="text" style:name="709">
      <style:paragraph-properties/>
      <style:text-properties fo:color="#0f4761" fo:font-style="italic"/>
    </style:style>
    <style:style style:parent-style-name="691" style:display-name="Intense Quote" style:family="paragraph" style:name="710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95" style:display-name="Intense Quote Char" style:family="text" style:name="711">
      <style:paragraph-properties/>
      <style:text-properties fo:color="#0f4761" fo:font-style="italic"/>
    </style:style>
    <style:style style:parent-style-name="695" style:display-name="Intense Reference" style:family="text" style:name="712">
      <style:paragraph-properties/>
      <style:text-properties fo:font-variant="small-caps" fo:color="#0f4761" fo:letter-spacing="0.25pt" fo:font-weight="bold"/>
    </style:style>
    <style:style style:parent-style-name="691" style:display-name="No Spacing" style:family="paragraph" style:name="713">
      <style:paragraph-properties fo:line-height="100%" fo:margin-bottom="0pt"/>
    </style:style>
    <style:style style:parent-style-name="695" style:display-name="Subtle Emphasis" style:family="text" style:name="714">
      <style:paragraph-properties/>
      <style:text-properties fo:color="#404040" fo:font-style="italic"/>
    </style:style>
    <style:style style:parent-style-name="695" style:display-name="Emphasis" style:family="text" style:name="715">
      <style:paragraph-properties/>
      <style:text-properties fo:font-style="italic"/>
    </style:style>
    <style:style style:parent-style-name="695" style:display-name="Strong" style:family="text" style:name="716">
      <style:paragraph-properties/>
      <style:text-properties fo:font-weight="bold"/>
    </style:style>
    <style:style style:parent-style-name="695" style:display-name="Subtle Reference" style:family="text" style:name="717">
      <style:paragraph-properties/>
      <style:text-properties fo:font-variant="small-caps" fo:color="#5a5a5a"/>
    </style:style>
    <style:style style:parent-style-name="695" style:display-name="Book Title" style:family="text" style:name="718">
      <style:paragraph-properties/>
      <style:text-properties fo:letter-spacing="0.25pt" fo:font-style="italic" fo:font-weight="bold"/>
    </style:style>
    <style:style style:parent-style-name="695" style:display-name="Header Char" style:family="text" style:name="719">
      <style:paragraph-properties/>
    </style:style>
    <style:style style:parent-style-name="695" style:display-name="Footer Char" style:family="text" style:name="720">
      <style:paragraph-properties/>
    </style:style>
    <style:style style:parent-style-name="691" style:display-name="footnote text" style:family="paragraph" style:name="721">
      <style:paragraph-properties fo:line-height="100%" fo:margin-bottom="0pt"/>
      <style:text-properties fo:font-size="10pt" style:font-size-complex="10pt"/>
    </style:style>
    <style:style style:parent-style-name="695" style:display-name="Footnote Text Char" style:family="text" style:name="722">
      <style:paragraph-properties/>
      <style:text-properties fo:font-size="10pt" style:font-size-complex="10pt"/>
    </style:style>
    <style:style style:parent-style-name="695" style:display-name="footnote reference" style:family="text" style:name="723">
      <style:paragraph-properties/>
      <style:text-properties style:text-position="super 58%"/>
    </style:style>
    <style:style style:parent-style-name="691" style:display-name="endnote text" style:family="paragraph" style:name="724">
      <style:paragraph-properties fo:line-height="100%" fo:margin-bottom="0pt"/>
      <style:text-properties fo:font-size="10pt" style:font-size-complex="10pt"/>
    </style:style>
    <style:style style:parent-style-name="695" style:display-name="Endnote Text Char" style:family="text" style:name="725">
      <style:paragraph-properties/>
      <style:text-properties fo:font-size="10pt" style:font-size-complex="10pt"/>
    </style:style>
    <style:style style:parent-style-name="695" style:display-name="endnote reference" style:family="text" style:name="726">
      <style:paragraph-properties/>
      <style:text-properties style:text-position="super 58%"/>
    </style:style>
    <style:style style:parent-style-name="695" style:display-name="Hyperlink" style:family="text" style:name="72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91" style:display-name="Internet link" style:family="text" style:name="72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91" style:display-name="Internet link" style:family="text" style:name="72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95" style:display-name="FollowedHyperlink" style:family="text" style:name="73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91" style:display-name="toc 1" style:family="paragraph" style:name="731">
      <style:paragraph-properties fo:margin-bottom="5pt"/>
    </style:style>
    <style:style style:parent-style-name="691" style:display-name="toc 2" style:family="paragraph" style:name="732">
      <style:paragraph-properties fo:margin-left="0.3881cm" fo:margin-right="0cm" fo:text-indent="0cm" fo:margin-bottom="5pt"/>
    </style:style>
    <style:style style:parent-style-name="691" style:display-name="toc 3" style:family="paragraph" style:name="733">
      <style:paragraph-properties fo:margin-left="0.7762cm" fo:margin-right="0cm" fo:text-indent="0cm" fo:margin-bottom="5pt"/>
    </style:style>
    <style:style style:parent-style-name="691" style:display-name="toc 4" style:family="paragraph" style:name="734">
      <style:paragraph-properties fo:margin-left="1.164cm" fo:margin-right="0cm" fo:text-indent="0cm" fo:margin-bottom="5pt"/>
    </style:style>
    <style:style style:parent-style-name="691" style:display-name="toc 5" style:family="paragraph" style:name="735">
      <style:paragraph-properties fo:margin-left="1.552cm" fo:margin-right="0cm" fo:text-indent="0cm" fo:margin-bottom="5pt"/>
    </style:style>
    <style:style style:parent-style-name="691" style:display-name="toc 6" style:family="paragraph" style:name="736">
      <style:paragraph-properties fo:margin-left="1.94cm" fo:margin-right="0cm" fo:text-indent="0cm" fo:margin-bottom="5pt"/>
    </style:style>
    <style:style style:parent-style-name="691" style:display-name="toc 7" style:family="paragraph" style:name="737">
      <style:paragraph-properties fo:margin-left="2.328cm" fo:margin-right="0cm" fo:text-indent="0cm" fo:margin-bottom="5pt"/>
    </style:style>
    <style:style style:parent-style-name="691" style:display-name="toc 8" style:family="paragraph" style:name="738">
      <style:paragraph-properties fo:margin-left="2.717cm" fo:margin-right="0cm" fo:text-indent="0cm" fo:margin-bottom="5pt"/>
    </style:style>
    <style:style style:parent-style-name="691" style:display-name="toc 9" style:family="paragraph" style:name="739">
      <style:paragraph-properties fo:margin-left="3.105cm" fo:margin-right="0cm" fo:text-indent="0cm" fo:margin-bottom="5pt"/>
    </style:style>
    <style:style style:parent-style-name="695" style:display-name="Placeholder Text" style:family="text" style:name="740">
      <style:paragraph-properties/>
      <style:text-properties fo:color="#666666"/>
    </style:style>
    <style:style style:parent-style-name="691" style:display-name="TOC Heading" style:family="paragraph" style:name="741">
      <style:paragraph-properties/>
    </style:style>
    <style:style style:parent-style-name="691" style:display-name="table of figures" style:family="paragraph" style:name="742">
      <style:paragraph-properties fo:margin-bottom="0pt"/>
    </style:style>
    <style:style style:parent-style-name="691" style:display-name="DStyle_paragraph" style:family="paragraph" style:name="743">
      <style:paragraph-properties/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3" style:display-name="Standard" style:family="paragraph" style:name="744">
      <style:paragraph-properties fo:line-height="105%" fo:text-align="left" fo:margin-top="0pt" fo:margin-bottom="8pt"/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744" style:display-name="Heading" style:family="paragraph" style:name="745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44" style:display-name="Text body" style:family="paragraph" style:name="746">
      <style:paragraph-properties fo:line-height="115%" fo:margin-top="0pt" fo:margin-bottom="7pt"/>
    </style:style>
    <style:style style:parent-style-name="746" style:display-name="List" style:family="paragraph" style:name="747">
      <style:paragraph-properties/>
    </style:style>
    <style:style style:parent-style-name="744" style:display-name="Caption" style:family="paragraph" style:name="748">
      <style:paragraph-properties fo:margin-top="6pt" fo:margin-bottom="6pt"/>
      <style:text-properties fo:font-size="12pt" style:font-size-complex="12pt" fo:font-style="italic"/>
    </style:style>
    <style:style style:parent-style-name="744" style:display-name="Index" style:family="paragraph" style:name="749">
      <style:paragraph-properties/>
    </style:style>
    <style:style style:parent-style-name="744" style:display-name="Heading 1" style:family="paragraph" style:name="750">
      <style:paragraph-properties fo:margin-top="12pt" fo:margin-bottom="0pt"/>
      <style:text-properties fo:color="#2f5496" fo:font-size="16pt" style:font-size-complex="16pt"/>
    </style:style>
    <style:style style:parent-style-name="744" style:display-name="Heading 2" style:family="paragraph" style:name="751">
      <style:paragraph-properties fo:margin-top="18pt" fo:margin-bottom="4pt"/>
      <style:text-properties fo:font-size="18pt" style:font-size-complex="18pt" fo:font-weight="bold"/>
    </style:style>
    <style:style style:parent-style-name="744" style:display-name="Heading 3" style:family="paragraph" style:name="752">
      <style:paragraph-properties fo:margin-top="2pt" fo:margin-bottom="0pt"/>
      <style:text-properties fo:color="#1f3763" fo:font-size="12pt" style:font-size-complex="12pt"/>
    </style:style>
    <style:style style:parent-style-name="744" style:display-name="Heading 4" style:family="paragraph" style:name="753">
      <style:paragraph-properties fo:margin-top="12pt" fo:margin-bottom="2pt"/>
      <style:text-properties fo:font-size="12pt" style:font-size-complex="12pt" fo:font-weight="bold"/>
    </style:style>
    <style:style style:parent-style-name="744" style:display-name="Heading 5" style:family="paragraph" style:name="754">
      <style:paragraph-properties fo:margin-top="11pt" fo:margin-bottom="2pt"/>
      <style:text-properties fo:font-weight="bold"/>
    </style:style>
    <style:style style:parent-style-name="744" style:display-name="Heading 6" style:family="paragraph" style:name="755">
      <style:paragraph-properties fo:margin-top="10pt" fo:margin-bottom="2pt"/>
      <style:text-properties fo:font-size="10pt" style:font-size-complex="10pt" fo:font-weight="bold"/>
    </style:style>
    <style:style style:parent-style-name="744" style:display-name="Title" style:family="paragraph" style:name="756">
      <style:paragraph-properties fo:margin-top="24pt" fo:margin-bottom="6pt"/>
      <style:text-properties fo:font-size="36pt" style:font-size-complex="36pt" fo:font-weight="bold"/>
    </style:style>
    <style:style style:parent-style-name="744" style:display-name="Subtitle" style:family="paragraph" style:name="757">
      <style:paragraph-properties fo:margin-top="18pt" fo:margin-bottom="4pt"/>
      <style:text-properties fo:color="#666666" fo:font-family="Georgia" style:font-family-complex="Georgia" fo:font-size="24pt" style:font-size-complex="24pt" fo:font-style="italic"/>
    </style:style>
    <style:style style:parent-style-name="744" style:display-name="List Paragraph" style:family="paragraph" style:name="758">
      <style:paragraph-properties fo:margin-left="1.27cm" fo:margin-right="0cm" fo:text-indent="0cm" fo:margin-top="0pt" fo:margin-bottom="8pt"/>
    </style:style>
    <style:style style:parent-style-name="744" style:display-name="Balloon Text" style:family="paragraph" style:name="759">
      <style:paragraph-properties fo:line-height="100%" fo:margin-top="0pt" fo:margin-bottom="0pt"/>
      <style:text-properties fo:font-family="Tahoma" style:font-family-complex="Tahoma" fo:font-size="8pt" style:font-size-complex="8pt"/>
    </style:style>
    <style:style style:parent-style-name="744" style:display-name="Header and Footer" style:family="paragraph" style:name="760">
      <style:paragraph-properties/>
    </style:style>
    <style:style style:parent-style-name="760" style:display-name="Header" style:family="paragraph" style:name="761">
      <style:paragraph-properties/>
    </style:style>
    <style:style style:parent-style-name="760" style:display-name="Footer" style:family="paragraph" style:name="762">
      <style:paragraph-properties/>
    </style:style>
    <style:style style:parent-style-name="691" style:display-name="Default Paragraph Font (WW)" style:family="text" style:name="763">
      <style:paragraph-properties/>
    </style:style>
    <style:style style:parent-style-name="763" style:display-name="markedcontent" style:family="text" style:name="764">
      <style:paragraph-properties/>
    </style:style>
    <style:style style:parent-style-name="763" style:display-name="Balloon Text Char" style:family="text" style:name="765">
      <style:paragraph-properties/>
      <style:text-properties fo:font-family="Tahoma" style:font-family-complex="Tahoma" fo:font-size="8pt" style:font-size-complex="8pt"/>
    </style:style>
    <style:style style:parent-style-name="691" style:display-name="T1" style:family="text" style:name="766">
      <style:paragraph-properties/>
    </style:style>
    <style:style style:parent-style-name="691" style:display-name="T2" style:family="text" style:name="767">
      <style:paragraph-properties/>
    </style:style>
    <style:style style:parent-style-name="691" style:display-name="T3" style:family="text" style:name="768">
      <style:paragraph-properties/>
    </style:style>
    <style:style style:parent-style-name="691" style:display-name="T4" style:family="text" style:name="769">
      <style:paragraph-properties/>
    </style:style>
    <style:style style:parent-style-name="691" style:display-name="T5" style:family="text" style:name="770">
      <style:paragraph-properties/>
    </style:style>
    <style:style style:parent-style-name="691" style:display-name="T6" style:family="text" style:name="771">
      <style:paragraph-properties/>
    </style:style>
    <style:style style:parent-style-name="691" style:display-name="T7" style:family="text" style:name="772">
      <style:paragraph-properties/>
    </style:style>
    <style:style style:parent-style-name="691" style:display-name="T8" style:family="text" style:name="773">
      <style:paragraph-properties/>
    </style:style>
    <style:style style:parent-style-name="691" style:display-name="T9" style:family="text" style:name="774">
      <style:paragraph-properties/>
    </style:style>
    <style:style style:parent-style-name="691" style:display-name="T10" style:family="text" style:name="775">
      <style:paragraph-properties/>
    </style:style>
    <style:style style:parent-style-name="691" style:display-name="T11" style:family="text" style:name="776">
      <style:paragraph-properties/>
    </style:style>
    <style:style style:parent-style-name="691" style:display-name="T12" style:family="text" style:name="777">
      <style:paragraph-properties/>
    </style:style>
    <style:style style:parent-style-name="691" style:display-name="T13" style:family="text" style:name="778">
      <style:paragraph-properties/>
    </style:style>
    <style:style style:parent-style-name="691" style:display-name="T14" style:family="text" style:name="779">
      <style:paragraph-properties/>
    </style:style>
    <style:style style:parent-style-name="691" style:display-name="T15" style:family="text" style:name="780">
      <style:paragraph-properties/>
    </style:style>
    <style:style style:parent-style-name="691" style:display-name="T16" style:family="text" style:name="781">
      <style:paragraph-properties/>
    </style:style>
    <style:style style:parent-style-name="691" style:display-name="T17" style:family="text" style:name="782">
      <style:paragraph-properties/>
    </style:style>
    <style:style style:parent-style-name="691" style:display-name="T18" style:family="text" style:name="783">
      <style:paragraph-properties/>
    </style:style>
    <style:style style:parent-style-name="691" style:display-name="T1" style:family="text" style:name="784">
      <style:paragraph-properties/>
    </style:style>
    <style:style style:parent-style-name="691" style:display-name="T2" style:family="text" style:name="785">
      <style:paragraph-properties/>
    </style:style>
    <style:style style:parent-style-name="691" style:display-name="T3" style:family="text" style:name="786">
      <style:paragraph-properties/>
    </style:style>
    <style:style style:parent-style-name="691" style:display-name="T4" style:family="text" style:name="787">
      <style:paragraph-properties/>
    </style:style>
    <style:style style:parent-style-name="691" style:display-name="T5" style:family="text" style:name="788">
      <style:paragraph-properties/>
    </style:style>
    <style:style style:parent-style-name="691" style:display-name="T6" style:family="text" style:name="789">
      <style:paragraph-properties/>
    </style:style>
    <style:style style:parent-style-name="691" style:display-name="T7" style:family="text" style:name="790">
      <style:paragraph-properties/>
    </style:style>
    <style:style style:parent-style-name="691" style:display-name="T8" style:family="text" style:name="791">
      <style:paragraph-properties/>
    </style:style>
    <style:style style:parent-style-name="691" style:display-name="T9" style:family="text" style:name="792">
      <style:paragraph-properties/>
    </style:style>
    <style:style style:parent-style-name="691" style:display-name="T10" style:family="text" style:name="793">
      <style:paragraph-properties/>
    </style:style>
    <style:style style:parent-style-name="691" style:display-name="T11" style:family="text" style:name="794">
      <style:paragraph-properties/>
    </style:style>
    <style:style style:parent-style-name="691" style:display-name="T12" style:family="text" style:name="795">
      <style:paragraph-properties/>
    </style:style>
    <style:style style:parent-style-name="691" style:display-name="T13" style:family="text" style:name="796">
      <style:paragraph-properties/>
    </style:style>
    <style:style style:parent-style-name="691" style:display-name="T14" style:family="text" style:name="797">
      <style:paragraph-properties/>
    </style:style>
    <style:style style:parent-style-name="691" style:display-name="T15" style:family="text" style:name="798">
      <style:paragraph-properties/>
    </style:style>
    <style:style style:parent-style-name="691" style:display-name="T16" style:family="text" style:name="799">
      <style:paragraph-properties/>
    </style:style>
    <style:style style:parent-style-name="691" style:display-name="T17" style:family="text" style:name="800">
      <style:paragraph-properties/>
    </style:style>
    <style:style style:parent-style-name="691" style:display-name="T18" style:family="text" style:name="80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0cm" fo:margin-bottom="0cm" fo:margin-left="2.54cm" fo:margin-right="2.54cm"/>
      <style:header-style>
        <style:header-footer-properties svg:height="0cm" fo:min-height="0cm"/>
      </style:header-style>
      <style:footer-style>
        <style:header-footer-properties fo:min-height="0cm"/>
      </style:footer-style>
    </style:page-layout>
    <style:page-layout style:name="Mpm2">
      <style:page-layout-properties fo:page-width="21cm" fo:page-height="29.7cm" style:print-orientation="portrait" fo:margin-top="0cm" fo:margin-bottom="0cm" fo:margin-left="2.54cm" fo:margin-right="2.54cm"/>
    </style:page-layout>
    <style:style style:parent-style-name="744" style:family="paragraph" style:name="P43">
      <style:paragraph-properties fo:line-height="105%" fo:text-align="left" fo:margin-top="0pt" fo:margin-bottom="8pt"/>
      <style:text-properties/>
    </style:style>
    <style:style style:parent-style-name="744" style:family="paragraph" style:name="P44">
      <style:paragraph-properties fo:line-height="105%" fo:text-align="left" fo:margin-top="0pt" fo:margin-bottom="8pt"/>
      <style:text-properties/>
    </style:style>
  </office:automatic-styles>
  <office:master-styles>
    <style:master-page style:name="Standard" style:page-layout-name="Mpm1">
      <style:footer>
        <text:p text:style-name="P44"><text:span/><text:span/></text:p>
      </style:footer>
      <style:header>
        <text:p text:style-name="P43"><text:span/><text:span/></text:p>
      </style:header>
    </style:master-page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4.0.129</meta:generator>
    <meta:creation-date>2023-03-26T21:27:00Z</meta:creation-date>
    <dc:language>en-US</dc:language>
    <meta:user-defined meta:name="AppVersion" meta:value-type="string">15.0000</meta:user-defined>
    <meta:user-defined meta:name="Company" meta:value-type="string">Hewlett-Packard Company</meta:user-defined>
  </office:meta>
</office:document-meta>
</file>